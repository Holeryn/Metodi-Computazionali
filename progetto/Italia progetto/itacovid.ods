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" table:style-name="ce2">
            <text:p>27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2">
            <text:p>28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2">
            <text:p>4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9" table:style-name="ce2">
            <text:p>49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2">
            <text:p>36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3" table:style-name="ce2">
            <text:p>133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7" table:style-name="ce2">
            <text:p>97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8" table:style-name="ce2">
            <text:p>16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96" table:style-name="ce2">
            <text:p>196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89" table:style-name="ce2">
            <text:p>189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0" table:style-name="ce2">
            <text:p>25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75" table:style-name="ce2">
            <text:p>175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68" table:style-name="ce2">
            <text:p>368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49" table:style-name="ce2">
            <text:p>349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45" table:style-name="ce2">
            <text:p>345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75" table:style-name="ce2">
            <text:p>475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27" table:style-name="ce2">
            <text:p>427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27" table:style-name="ce2">
            <text:p>627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93" table:style-name="ce2">
            <text:p>793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51" table:style-name="ce2">
            <text:p>651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01" table:style-name="ce2">
            <text:p>601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743" table:style-name="ce2">
            <text:p>743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83" table:style-name="ce2">
            <text:p>683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712" table:style-name="ce2">
            <text:p>712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19" table:style-name="ce2">
            <text:p>919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889" table:style-name="ce2">
            <text:p>889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56" table:style-name="ce2">
            <text:p>756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12" table:style-name="ce2">
            <text:p>812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37" table:style-name="ce2">
            <text:p>837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727" table:style-name="ce2">
            <text:p>727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760" table:style-name="ce2">
            <text:p>760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766" table:style-name="ce2">
            <text:p>766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81" table:style-name="ce2">
            <text:p>68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25" table:style-name="ce2">
            <text:p>525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36" table:style-name="ce2">
            <text:p>636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04" table:style-name="ce2">
            <text:p>60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42" table:style-name="ce2">
            <text:p>542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10" table:style-name="ce2">
            <text:p>610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70" table:style-name="ce2">
            <text:p>570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619" table:style-name="ce2">
            <text:p>619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31" table:style-name="ce2">
            <text:p>431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66" table:style-name="ce2">
            <text:p>566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602" table:style-name="ce2">
            <text:p>602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78" table:style-name="ce2">
            <text:p>578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25" table:style-name="ce2">
            <text:p>525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75" table:style-name="ce2">
            <text:p>575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82" table:style-name="ce2">
            <text:p>482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33" table:style-name="ce2">
            <text:p>433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54" table:style-name="ce2">
            <text:p>454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34" table:style-name="ce2">
            <text:p>534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37" table:style-name="ce2">
            <text:p>437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64" table:style-name="ce2">
            <text:p>464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20" table:style-name="ce2">
            <text:p>42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15" table:style-name="ce2">
            <text:p>415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60" table:style-name="ce2">
            <text:p>260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33" table:style-name="ce2">
            <text:p>333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82" table:style-name="ce2">
            <text:p>382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23" table:style-name="ce2">
            <text:p>323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85" table:style-name="ce2">
            <text:p>28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69" table:style-name="ce2">
            <text:p>269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74" table:style-name="ce2">
            <text:p>474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74" table:style-name="ce2">
            <text:p>174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95" table:style-name="ce2">
            <text:p>195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36" table:style-name="ce2">
            <text:p>236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69" table:style-name="ce2">
            <text:p>369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74" table:style-name="ce2">
            <text:p>274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43" table:style-name="ce2">
            <text:p>243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94" table:style-name="ce2">
            <text:p>194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5" table:style-name="ce2">
            <text:p>165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79" table:style-name="ce2">
            <text:p>179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72" table:style-name="ce2">
            <text:p>17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95" table:style-name="ce2">
            <text:p>195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62" table:style-name="ce2">
            <text:p>262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42" table:style-name="ce2">
            <text:p>242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53" table:style-name="ce2">
            <text:p>153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45" table:style-name="ce2">
            <text:p>145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9" table:style-name="ce2">
            <text:p>99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62" table:style-name="ce2">
            <text:p>162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61" table:style-name="ce2">
            <text:p>161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56" table:style-name="ce2">
            <text:p>156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30" table:style-name="ce2">
            <text:p>13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19" table:style-name="ce2">
            <text:p>119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0" table:style-name="ce2">
            <text:p>5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2" table:style-name="ce2">
            <text:p>92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78" table:style-name="ce2">
            <text:p>78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17" table:style-name="ce2">
            <text:p>117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0" table:style-name="ce2">
            <text:p>7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7" table:style-name="ce2">
            <text:p>87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1" table:style-name="ce2">
            <text:p>11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75" table:style-name="ce2">
            <text:p>75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5" table:style-name="ce2">
            <text:p>55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71" table:style-name="ce2">
            <text:p>71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88" table:style-name="ce2">
            <text:p>88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5" table:style-name="ce2">
            <text:p>85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2" table:style-name="ce2">
            <text:p>72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3" table:style-name="ce2">
            <text:p>53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65" table:style-name="ce2">
            <text:p>65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79" table:style-name="ce2">
            <text:p>79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1" table:style-name="ce2">
            <text:p>71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3" table:style-name="ce2">
            <text:p>53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6" table:style-name="ce2">
            <text:p>56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78" table:style-name="ce2">
            <text:p>78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4" table:style-name="ce2">
            <text:p>44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6" table:style-name="ce2">
            <text:p>26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4" table:style-name="ce2">
            <text:p>34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3" table:style-name="ce2">
            <text:p>43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6" table:style-name="ce2">
            <text:p>66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7" table:style-name="ce2">
            <text:p>47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9" table:style-name="ce2">
            <text:p>49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4" table:style-name="ce2">
            <text:p>24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3" table:style-name="ce2">
            <text:p>23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4" table:style-name="ce2">
            <text:p>34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2" table:style-name="ce2">
            <text:p>22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3" table:style-name="ce2">
            <text:p>23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1" table:style-name="ce2">
            <text:p>21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1" table:style-name="ce2">
            <text:p>21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7" table:style-name="ce2">
            <text:p>1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0" table:style-name="ce2">
            <text:p>2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1" table:style-name="ce2">
            <text:p>11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1" table:style-name="ce2">
            <text:p>11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58" table:style-name="ce2">
            <text:p>158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1" table:style-name="ce2">
            <text:p>11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6" table:style-name="ce2">
            <text:p>16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4" table:style-name="ce2">
            <text:p>24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7" table:style-name="ce2">
            <text:p>17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0" table:style-name="ce2">
            <text:p>20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3" table:style-name="ce2">
            <text:p>23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0" table:style-name="ce2">
            <text:p>20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7" table:style-name="ce2">
            <text:p>17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7" table:style-name="ce2">
            <text:p>17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6" table:style-name="ce2">
            <text:p>16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4" table:style-name="ce2">
            <text:p>24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9" table:style-name="ce2">
            <text:p>19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4" table:style-name="ce2">
            <text:p>24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3" table:style-name="ce2">
            <text:p>23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7" table:style-name="ce2">
            <text:p>27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6" table:style-name="ce2">
            <text:p>16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8" table:style-name="ce2">
            <text:p>28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1" table:style-name="ce2">
            <text:p>31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2" table:style-name="ce2">
            <text:p>22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8" table:style-name="ce2">
            <text:p>28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9" table:style-name="ce2">
            <text:p>29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6" table:style-name="ce2">
            <text:p>26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9" table:style-name="ce2">
            <text:p>39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1" table:style-name="ce2">
            <text:p>41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43" table:style-name="ce2">
            <text:p>43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83" table:style-name="ce2">
            <text:p>83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5" table:style-name="ce2">
            <text:p>55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7" table:style-name="ce2">
            <text:p>47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69" table:style-name="ce2">
            <text:p>69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73" table:style-name="ce2">
            <text:p>73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89" table:style-name="ce2">
            <text:p>89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27" table:style-name="ce2">
            <text:p>127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36" table:style-name="ce2">
            <text:p>136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91" table:style-name="ce2">
            <text:p>91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51" table:style-name="ce2">
            <text:p>151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28" table:style-name="ce2">
            <text:p>128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41" table:style-name="ce2">
            <text:p>141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21" table:style-name="ce2">
            <text:p>221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05" table:style-name="ce2">
            <text:p>205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17" table:style-name="ce2">
            <text:p>217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99" table:style-name="ce2">
            <text:p>199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97" table:style-name="ce2">
            <text:p>297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08" table:style-name="ce2">
            <text:p>208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33" table:style-name="ce2">
            <text:p>233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53" table:style-name="ce2">
            <text:p>353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52" table:style-name="ce2">
            <text:p>352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428" table:style-name="ce2">
            <text:p>428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46" table:style-name="ce2">
            <text:p>446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425" table:style-name="ce2">
            <text:p>425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31" table:style-name="ce2">
            <text:p>331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56" table:style-name="ce2">
            <text:p>356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580" table:style-name="ce2">
            <text:p>580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623" table:style-name="ce2">
            <text:p>623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636" table:style-name="ce2">
            <text:p>636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550" table:style-name="ce2">
            <text:p>550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544" table:style-name="ce2">
            <text:p>544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46" table:style-name="ce2">
            <text:p>546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504" table:style-name="ce2">
            <text:p>504</text:p>
          </table:table-cell>
          <table:table-cell table:number-columns-repeated="16382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731" table:style-name="ce2">
            <text:p>731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753" table:style-name="ce2">
            <text:p>753</text:p>
          </table:table-cell>
          <table:table-cell table:number-columns-repeated="16382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653" table:style-name="ce2">
            <text:p>653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699" table:style-name="ce2">
            <text:p>699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92" table:style-name="ce2">
            <text:p>692</text:p>
          </table:table-cell>
          <table:table-cell table:number-columns-repeated="1638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562" table:style-name="ce2">
            <text:p>562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630" table:style-name="ce2">
            <text:p>630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853" table:style-name="ce2">
            <text:p>853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722" table:style-name="ce2">
            <text:p>722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822" table:style-name="ce2">
            <text:p>822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827" table:style-name="ce2">
            <text:p>827</text:p>
          </table:table-cell>
          <table:table-cell table:number-columns-repeated="16382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86" table:style-name="ce2">
            <text:p>686</text:p>
          </table:table-cell>
          <table:table-cell table:number-columns-repeated="16382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541" table:style-name="ce2">
            <text:p>541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672" table:style-name="ce2">
            <text:p>672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785" table:style-name="ce2">
            <text:p>785</text:p>
          </table:table-cell>
          <table:table-cell table:number-columns-repeated="16382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684" table:style-name="ce2">
            <text:p>684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993" table:style-name="ce2">
            <text:p>993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814" table:style-name="ce2">
            <text:p>814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662" table:style-name="ce2">
            <text:p>662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64" table:style-name="ce2">
            <text:p>564</text:p>
          </table:table-cell>
          <table:table-cell table:number-columns-repeated="16382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528" table:style-name="ce2">
            <text:p>528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634" table:style-name="ce2">
            <text:p>634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99" table:style-name="ce2">
            <text:p>499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887" table:style-name="ce2">
            <text:p>887</text:p>
          </table:table-cell>
          <table:table-cell table:number-columns-repeated="16382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761" table:style-name="ce2">
            <text:p>761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649" table:style-name="ce2">
            <text:p>649</text:p>
          </table:table-cell>
          <table:table-cell table:number-columns-repeated="1638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484" table:style-name="ce2">
            <text:p>484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91" table:style-name="ce2">
            <text:p>491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846" table:style-name="ce2">
            <text:p>846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680" table:style-name="ce2">
            <text:p>680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83" table:style-name="ce2">
            <text:p>683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674" table:style-name="ce2">
            <text:p>674</text:p>
          </table:table-cell>
          <table:table-cell table:number-columns-repeated="16382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553" table:style-name="ce2">
            <text:p>553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52" table:style-name="ce2">
            <text:p>352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415" table:style-name="ce2">
            <text:p>415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628" table:style-name="ce2">
            <text:p>628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53" table:style-name="ce2">
            <text:p>553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05" table:style-name="ce2">
            <text:p>505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459" table:style-name="ce2">
            <text:p>459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61" table:style-name="ce2">
            <text:p>261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05" table:style-name="ce2">
            <text:p>305</text:p>
          </table:table-cell>
          <table:table-cell table:number-columns-repeated="16382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45" table:style-name="ce2">
            <text:p>445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659" table:style-name="ce2">
            <text:p>659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75" table:style-name="ce2">
            <text:p>575</text:p>
          </table:table-cell>
          <table:table-cell table:number-columns-repeated="16382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55" table:style-name="ce2">
            <text:p>555</text:p>
          </table:table-cell>
          <table:table-cell table:number-columns-repeated="16382"/>
        </table:table-row>
        <table:table-row table:number-rows-repeated="5" table:style-name="ro1">
          <table:table-cell table:style-name="ce1"/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8176" table:style-name="ro1">
          <table:table-cell/>
          <table:table-cell office:value-type="float" office:value="0" table:style-name="ce2">
            <text:p>0</text:p>
          </table:table-cell>
          <table:table-cell table:number-columns-repeated="1638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Lorenzo Brancaccio</meta:initial-creator>
    <dc:creator>LORENZO BRANCACCIO</dc:creator>
    <meta:creation-date>2015-06-05T18:17:20Z</meta:creation-date>
    <dc:date>2026-06-15T09:44:49Z</dc:date>
  </office:meta>
</office:document-meta>
</file>